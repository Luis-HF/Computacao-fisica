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3908DB8E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116cm" table:align="left"/>
    </style:style>
    <style:style style:name="Tabela1.A" style:family="table-column">
      <style:table-column-properties style:column-width="5.685cm"/>
    </style:style>
    <style:style style:name="Tabela1.B" style:family="table-column">
      <style:table-column-properties style:column-width="1.43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5e8a" officeooo:paragraph-rsid="000a5e8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a5e8a" officeooo:paragraph-rsid="000a5e8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5e8a" officeooo:paragraph-rsid="000a5e8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a5e8a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 style:contextual-spacing="false"/>
      <style:text-properties fo:font-size="12p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font-size="12p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font-size="12pt" style:font-size-asian="12pt" style:font-size-complex="12pt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2pt" style:font-size-asian="12pt" style:font-size-complex="12pt"/>
    </style:style>
    <style:style style:name="P12" style:family="paragraph" style:parent-style-name="Text_20_body" style:list-style-name="L4"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a5e8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a5e8a" style:font-size-asian="12pt" style:font-size-complex="12pt"/>
    </style:style>
    <style:style style:name="T4" style:family="text">
      <style:text-properties fo:font-weight="bold" officeooo:rsid="000a5e8a" style:font-weight-asian="bold" style:font-weight-complex="bold"/>
    </style:style>
    <style:style style:name="T5" style:family="text">
      <style:text-properties officeooo:rsid="000c54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IFICADORA PARTE 1:</text:p>
      <text:p text:style-name="P1"/>
      <text:p text:style-name="P2"/>
      <text:p text:style-name="P3">Questão 1:</text:p>
      <text:p text:style-name="P3"/>
      <text:p text:style-name="P4"><text:span text:style-name="T4"><text:tab/></text:span>Questão 1 — Três formas de medir temperatura</text:p>
      <text:p text:style-name="Text_20_body"><text:span text:style-name="T2">Você precisa descrever 3 tecnologias diferentes e a </text:span><text:span text:style-name="Strong_20_Emphasis"><text:span text:style-name="T2">interface</text:span></text:span><text:span text:style-name="T2"> de cada uma (como o microcontrolador lê o valor). </text:span></text:p>
      <text:p text:style-name="Text_20_body"><text:span text:style-name="Strong_20_Emphasis"><text:span text:style-name="T2">1. Termistor NTC</text:span></text:span></text:p>
      <text:list text:style-name="L1">
        <text:list-item>
          <text:p text:style-name="P8">Princípio: resistência elétrica <text:s/><text:span text:style-name="T1">que </text:span>varia com a temperatura (NTC = coeficiente negativo, resistência cai quando a temperatura sobe <text:span text:style-name="T1">e tal característica permite leitura da temperatura</text:span>). </text:p>
        </text:list-item>
        <text:list-item>
          <text:p text:style-name="P5"><text:span text:style-name="T2">Interface: é um componente </text:span><text:span text:style-name="Emphasis"><text:span text:style-name="T2">passivo, </text:span></text:span><text:span text:style-name="Emphasis"><text:span text:style-name="T3">ou seja, </text:span></text:span><text:span text:style-name="T2">não gera sinal por si só. </text:span><text:span text:style-name="T3">O </text:span><text:span text:style-name="T2">NTC é </text:span><text:span text:style-name="T3">ligado </text:span><text:span text:style-name="T2">em série com um resistor conhecido, formando um divisor; a tensão no meio do divisor varia com a resistência do NTC, e essa tensão (analógica) vai pra uma entrada ADC do microcontrolador (no Arduino, pinos A0-A5). O firmware faz a conversão tensão → resistência → temperatura (geralmente via equação de Steinhart-Hart ou tabela de calibração). </text:span><text:span text:style-name="T3">Em resumo, o aumento da temperatura causa a redução da resistência e com base na curva/gráfico conhecido nós podemos medir a temperatura ambiente lendo essa variação.</text:span></text:p>
        </text:list-item>
      </text:list>
      <text:p text:style-name="Text_20_body"><text:span text:style-name="Strong_20_Emphasis"><text:span text:style-name="T2">2. Termopar tipo K</text:span></text:span></text:p>
      <text:list text:style-name="L2">
        <text:list-item>
          <text:p text:style-name="P9">Princípio: efeito Seebeck — a junção de dois metais diferentes gera uma diferença de potencial proporcional à diferença de temperatura entre a junção quente e a junção de referência. </text:p>
        </text:list-item>
        <text:list-item>
          <text:p text:style-name="P6"><text:span text:style-name="T2">Interface: a tensão gerada é muito pequena (microvolts/°C), então não pode ir direto num ADC comum. Por isso o projeto usa um </text:span><text:span text:style-name="Strong_20_Emphasis"><text:span text:style-name="T2">amplificador operacional</text:span></text:span><text:span text:style-name="T2"> para amplificar o sinal antes de entrar no ADC (pino A0, conforme a Tabela 1). Em projetos mais robustos, normalmente se usa um CI dedicado (ex. MAX6675/MAX31855) que já faz amplificação, compensação de junção fria e até comunicação digital (SPI), mas aqui a amplificação é feita com op-amp discreto. </text:span></text:p>
        </text:list-item>
      </text:list>
      <text:p text:style-name="Text_20_body"><text:span text:style-name="Strong_20_Emphasis"><text:span text:style-name="T2">3. Circuito integrado sensor digital (ex. DS18B20)</text:span></text:span></text:p>
      <text:list text:style-name="L3">
        <text:list-item>
          <text:p text:style-name="P10">Princípio: sensor de temperatura semicondutor com eletrônica de conversão embutida no próprio chip. </text:p>
        </text:list-item>
        <text:list-item>
          <text:p text:style-name="P7"><text:span text:style-name="T2">Interface: comunicação </text:span><text:span text:style-name="Strong_20_Emphasis"><text:span text:style-name="T2">digital</text:span></text:span><text:span text:style-name="T2"> via protocolo 1-Wire — um único pino de dados do microcontrolador, sem precisar de ADC. O chip já entrega o valor de temperatura calculado, em formato digital (ex. 12 bits), via protocolo serial. </text:span></text:p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3" text:outline-level="3"><text:soft-page-break/><text:span text:style-name="T2">Questão 2 — Função de mapeamento Voltagem → Temperatura</text:span></text:h>
      <text:h text:style-name="Heading_20_4" text:outline-level="4">O que os números mostram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Modelo</text:p>
            </table:table-cell>
            <table:table-cell table:style-name="Tabela1.A1" office:value-type="string">
              <text:p text:style-name="Table_20_Heading">R²</text:p>
            </table:table-cell>
          </table:table-row>
        </table:table-header-rows>
        <table:table-row>
          <table:table-cell table:style-name="Tabela1.A1" office:value-type="string">
            <text:p text:style-name="Table_20_Contents">Linear (T = aV + b)</text:p>
          </table:table-cell>
          <table:table-cell table:style-name="Tabela1.A1" office:value-type="string">
            <text:p text:style-name="Table_20_Contents">0,9975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Quadrático (T = aV² + bV + c)</text:span></text:p>
          </table:table-cell>
          <table:table-cell table:style-name="Tabela1.A1" office:value-type="string">
            <text:p text:style-name="Table_20_Contents"><text:span text:style-name="Strong_20_Emphasis">0,9989</text:span></text:p>
          </table:table-cell>
        </table:table-row>
        <table:table-row>
          <table:table-cell table:style-name="Tabela1.A1" office:value-type="string">
            <text:p text:style-name="Table_20_Contents">Cúbico</text:p>
          </table:table-cell>
          <table:table-cell table:style-name="Tabela1.A1" office:value-type="string">
            <text:p text:style-name="Table_20_Contents">0,9997</text:p>
          </table:table-cell>
        </table:table-row>
      </table:table>
      <text:p text:style-name="Text_20_body"><text:span text:style-name="Strong_20_Emphasis"/></text:p>
      <text:list text:style-name="L5">
        <text:list-item>
          <text:p text:style-name="P15"><text:span text:style-name="Strong_20_Emphasis">A resposta não é perfeitamente linear.</text:span> Termopares tipo K têm uma curva característica ligeiramente não-linear (é um fato físico conhecido — a relação tensão-temperatura da junção metálica segue um polinômio, não uma reta exata; por isso, na prática, datasheets de termopares tipo K trazem tabelas com polinômios de grau 4 a 9 para alta precisão). </text:p>
        </text:list-item>
        <text:list-item>
          <text:p text:style-name="P15">Para os 7 pontos dessa tabela, <text:span text:style-name="Strong_20_Emphasis">um polinômio de segundo grau (quadrático) já aproxima muito bem</text:span> a curva — é o "menor grau que captura a curvatura real" sem ficar <text:span text:style-name="T5">distante ou instável</text:span>. </text:p>
        </text:list-item>
      </text:list>
      <text:p text:style-name="Text_20_body"/>
      <text:p text:style-name="Text_20_body"><text:span text:style-name="T2"/></text:p>
      <text:p text:style-name="Text_20_body"><draw:frame draw:style-name="fr1" draw:name="Figura1" text:anchor-type="char" svg:width="17cm" svg:height="11.686cm" draw:z-index="0"><draw:image xlink:href="Pictures/10000001000004B00000033908DB8E86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4T14:34:27.536085272</meta:creation-date>
    <dc:date>2026-06-24T15:02:27.553702015</dc:date>
    <meta:editing-duration>PT3M47S</meta:editing-duration>
    <meta:editing-cycles>1</meta:editing-cycles>
    <meta:document-statistic meta:table-count="1" meta:image-count="1" meta:object-count="0" meta:page-count="2" meta:paragraph-count="25" meta:word-count="445" meta:character-count="2713" meta:non-whitespace-character-count="2287"/>
    <meta:generator>LibreOffice/24.2.7.2$Linux_X86_64 LibreOffice_project/420$Build-2</meta:generator>
  </office:meta>
</office:document-meta>
</file>