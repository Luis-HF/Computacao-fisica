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E0000027A68326452.png" manifest:media-type="image/png"/>
  <manifest:file-entry manifest:full-path="Pictures/10000001000002C0000002872E4AC200.png" manifest:media-type="image/png"/>
  <manifest:file-entry manifest:full-path="Pictures/100000010000032000000181EBFF29F6.png" manifest:media-type="image/png"/>
  <manifest:file-entry manifest:full-path="Pictures/100000010000047F000002E27E039DDC.png" manifest:media-type="image/png"/>
  <manifest:file-entry manifest:full-path="Pictures/1000000100000316000001EFB3BD2B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Verdana2" fo:font-size="10pt" officeooo:rsid="00418c9a" officeooo:paragraph-rsid="004e6d5d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2" fo:font-size="10pt" officeooo:rsid="004ceff4" officeooo:paragraph-rsid="004e6d5d" style:font-size-asian="10pt" style:font-size-complex="10pt"/>
    </style:style>
    <style:style style:name="P7" style:family="paragraph" style:parent-style-name="Standard">
      <style:text-properties style:font-name="Verdana2" fo:font-size="10pt" officeooo:rsid="004ceff4" officeooo:paragraph-rsid="004ceff4" style:font-size-asian="10pt" style:font-size-complex="10pt"/>
    </style:style>
    <style:style style:name="P8" style:family="paragraph" style:parent-style-name="Standard">
      <style:text-properties style:font-name="Verdana2" fo:font-size="10pt" officeooo:rsid="0053a3c0" officeooo:paragraph-rsid="00418c9a" style:font-size-asian="10pt" style:font-size-complex="10pt"/>
    </style:style>
    <style:style style:name="P9" style:family="paragraph" style:parent-style-name="Standard">
      <style:text-properties style:font-name="Verdana2" fo:font-size="10pt" officeooo:rsid="00603a9a" officeooo:paragraph-rsid="00603a9a" style:font-size-asian="10pt" style:font-size-complex="10pt"/>
    </style:style>
    <style:style style:name="P10" style:family="paragraph" style:parent-style-name="Standard">
      <style:text-properties style:font-name="Verdana2" fo:font-size="10pt" officeooo:rsid="00603a9a" officeooo:paragraph-rsid="005d4c05" style:font-size-asian="10pt" style:font-size-complex="10pt"/>
    </style:style>
    <style:style style:name="P11" style:family="paragraph" style:parent-style-name="Standard">
      <style:text-properties style:font-name="Verdana2" fo:font-size="10pt" officeooo:rsid="005bdd3e" officeooo:paragraph-rsid="005c08a0" style:font-size-asian="10pt" style:font-size-complex="10pt"/>
    </style:style>
    <style:style style:name="P12" style:family="paragraph" style:parent-style-name="Standard">
      <style:text-properties style:font-name="Verdana2" fo:font-size="10pt" officeooo:rsid="004e6d5d" officeooo:paragraph-rsid="00418c9a" style:font-size-asian="10pt" style:font-size-complex="10pt"/>
    </style:style>
    <style:style style:name="P13" style:family="paragraph" style:parent-style-name="Standard">
      <style:text-properties style:font-name="Verdana2" fo:font-size="10pt" officeooo:rsid="005d4c05" officeooo:paragraph-rsid="00418c9a" style:font-size-asian="10pt" style:font-size-complex="10pt"/>
    </style:style>
    <style:style style:name="P14" style:family="paragraph" style:parent-style-name="Standard">
      <style:text-properties style:font-name="Verdana2" fo:font-size="10pt" officeooo:rsid="0032e1e6" officeooo:paragraph-rsid="00698038" style:font-size-asian="10pt" style:font-size-complex="10pt"/>
    </style:style>
    <style:style style:name="P15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normal" officeooo:rsid="005d4c05" officeooo:paragraph-rsid="005d4c05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Verdana2" fo:font-size="10pt" fo:font-weight="normal" officeooo:rsid="005a68b6" officeooo:paragraph-rsid="002b2701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20" style:family="paragraph" style:parent-style-name="Standard">
      <style:text-properties style:font-name="Verdana1" fo:font-size="10pt" fo:font-weight="bold" officeooo:rsid="003c6279" officeooo:paragraph-rsid="002b2701" style:font-size-asian="10pt" style:font-weight-asian="bold" style:font-name-complex="Verdana3" style:font-size-complex="10pt" style:font-weight-complex="bold"/>
    </style:style>
    <style:style style:name="P21" style:family="paragraph" style:parent-style-name="Standard">
      <style:text-properties style:font-name="Verdana1" fo:font-size="10pt" fo:font-weight="bold" officeooo:rsid="003c6279" officeooo:paragraph-rsid="003d5b83" style:font-size-asian="10pt" style:font-weight-asian="bold" style:font-name-complex="Verdana3" style:font-size-complex="10pt" style:font-weight-complex="bold"/>
    </style:style>
    <style:style style:name="P22" style:family="paragraph" style:parent-style-name="Standard">
      <style:text-properties style:font-name="Verdana1" fo:font-size="10pt" fo:font-weight="bold" officeooo:rsid="0010890b" officeooo:paragraph-rsid="002b2701" style:font-size-asian="10pt" style:font-weight-asian="bold" style:font-name-complex="Verdana3" style:font-size-complex="10pt" style:font-weight-complex="bold"/>
    </style:style>
    <style:style style:name="P23" style:family="paragraph" style:parent-style-name="Standard">
      <style:text-properties officeooo:paragraph-rsid="0038ddd1"/>
    </style:style>
    <style:style style:name="P24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fo:font-weight="bold" officeooo:rsid="004346c4" officeooo:paragraph-rsid="004346c4" fo:background-color="#ffff00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10pt" fo:font-weight="bold" officeooo:rsid="0008eca3" officeooo:paragraph-rsid="0024dc6c" style:font-size-asian="10pt" style:font-weight-asian="bold" style:font-size-complex="10pt" style:font-weight-complex="bold"/>
    </style:style>
    <style:style style:name="P27" style:family="paragraph" style:parent-style-name="Standard">
      <style:text-properties officeooo:rsid="005bdd3e" officeooo:paragraph-rsid="005bdd3e"/>
    </style:style>
    <style:style style:name="P28" style:family="paragraph" style:parent-style-name="Standard">
      <style:text-properties officeooo:rsid="005bdd3e" officeooo:paragraph-rsid="005c08a0"/>
    </style:style>
    <style:style style:name="P29" style:family="paragraph" style:parent-style-name="Standard">
      <style:text-properties officeooo:rsid="00418c9a" officeooo:paragraph-rsid="00418c9a"/>
    </style:style>
    <style:style style:name="P30" style:family="paragraph" style:parent-style-name="Standard">
      <style:text-properties officeooo:rsid="005d4c05" officeooo:paragraph-rsid="005d4c05"/>
    </style:style>
    <style:style style:name="P31" style:family="paragraph" style:parent-style-name="Standard">
      <style:text-properties officeooo:rsid="005411fe" officeooo:paragraph-rsid="005411fe"/>
    </style:style>
    <style:style style:name="P32" style:family="paragraph" style:parent-style-name="Standard">
      <style:text-properties officeooo:rsid="0067083b" officeooo:paragraph-rsid="0067083b"/>
    </style:style>
    <style:style style:name="P33" style:family="paragraph" style:parent-style-name="Standard">
      <style:text-properties fo:color="#cc3300" loext:opacity="100%" style:font-name="Verdana2" fo:font-size="10pt" officeooo:rsid="002ffab7" officeooo:paragraph-rsid="00698038" style:font-size-asian="10pt" style:font-size-complex="10pt"/>
    </style:style>
    <style:style style:name="P34" style:family="paragraph" style:parent-style-name="Standard">
      <style:text-properties fo:color="#ff0000" loext:opacity="100%" style:font-name="Verdana2" fo:font-size="10pt" officeooo:rsid="0032e1e6" officeooo:paragraph-rsid="00698038" style:font-size-asian="10pt" style:font-size-complex="10pt"/>
    </style:style>
    <style:style style:name="P35" style:family="paragraph" style:parent-style-name="Standard">
      <style:text-properties fo:color="#ff0000" loext:opacity="100%" style:font-name="Verdana2" fo:font-size="10pt" officeooo:rsid="0047b552" officeooo:paragraph-rsid="00698038" style:font-size-asian="10pt" style:font-size-complex="10pt"/>
    </style:style>
    <style:style style:name="P36" style:family="paragraph" style:parent-style-name="Standard">
      <style:text-properties fo:color="#ff0000" loext:opacity="100%" style:font-name="Verdana2" fo:font-size="10pt" officeooo:rsid="0048fe36" officeooo:paragraph-rsid="0069803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58f5e9" style:font-weight-asian="normal" style:font-weight-complex="normal"/>
    </style:style>
    <style:style style:name="T4" style:family="text">
      <style:text-properties fo:font-weight="normal" officeooo:rsid="005a68b6" style:font-weight-asian="normal" style:font-weight-complex="normal"/>
    </style:style>
    <style:style style:name="T5" style:family="text">
      <style:text-properties officeooo:rsid="001a8352"/>
    </style:style>
    <style:style style:name="T6" style:family="text">
      <style:text-properties style:font-name="Verdana1" style:font-name-complex="Verdana3"/>
    </style:style>
    <style:style style:name="T7" style:family="text">
      <style:text-properties style:font-name="Verdana1" officeooo:rsid="0010890b" style:font-name-complex="Verdana3"/>
    </style:style>
    <style:style style:name="T8" style:family="text">
      <style:text-properties style:font-name="Verdana1" officeooo:rsid="002b2701" style:font-name-complex="Verdana3"/>
    </style:style>
    <style:style style:name="T9" style:family="text">
      <style:text-properties style:font-name="Verdana1" officeooo:rsid="003c6279" style:font-name-complex="Verdana3"/>
    </style:style>
    <style:style style:name="T10" style:family="text">
      <style:text-properties style:font-name="Verdana1" officeooo:rsid="004efd74" style:font-name-complex="Verdana3"/>
    </style:style>
    <style:style style:name="T11" style:family="text">
      <style:text-properties style:font-name="Verdana1" officeooo:rsid="00603a9a" style:font-name-complex="Verdana3"/>
    </style:style>
    <style:style style:name="T12" style:family="text">
      <style:text-properties style:font-name="Verdana1" officeooo:rsid="006428ed" style:font-name-complex="Verdana3"/>
    </style:style>
    <style:style style:name="T13" style:family="text">
      <style:text-properties officeooo:rsid="0021fc76"/>
    </style:style>
    <style:style style:name="T14" style:family="text">
      <style:text-properties officeooo:rsid="002ffab7"/>
    </style:style>
    <style:style style:name="T15" style:family="text">
      <style:text-properties style:font-name="Verdana2" fo:font-size="10pt" style:font-size-asian="10pt" style:font-size-complex="10pt"/>
    </style:style>
    <style:style style:name="T16" style:family="text">
      <style:text-properties style:font-name="Verdana2" fo:font-size="10pt" officeooo:rsid="0038ddd1" style:font-size-asian="10pt" style:font-size-complex="10pt"/>
    </style:style>
    <style:style style:name="T17" style:family="text">
      <style:text-properties style:font-name="Verdana2" fo:font-size="10pt" officeooo:rsid="004018c8" style:font-size-asian="10pt" style:font-size-complex="10pt"/>
    </style:style>
    <style:style style:name="T18" style:family="text">
      <style:text-properties style:font-name="Verdana2" fo:font-size="10pt" officeooo:rsid="004e6d5d" style:font-size-asian="10pt" style:font-size-complex="10pt"/>
    </style:style>
    <style:style style:name="T19" style:family="text">
      <style:text-properties style:font-name="Verdana2" fo:font-size="10pt" officeooo:rsid="005285ee" style:font-size-asian="10pt" style:font-size-complex="10pt"/>
    </style:style>
    <style:style style:name="T20" style:family="text">
      <style:text-properties style:font-name="Verdana2" fo:font-size="10pt" officeooo:rsid="005c08a0" style:font-size-asian="10pt" style:font-size-complex="10pt"/>
    </style:style>
    <style:style style:name="T21" style:family="text">
      <style:text-properties style:font-name="Verdana2" fo:font-size="10pt" officeooo:rsid="005d4c05" style:font-size-asian="10pt" style:font-size-complex="10pt"/>
    </style:style>
    <style:style style:name="T22" style:family="text">
      <style:text-properties style:font-name="Verdana2" fo:font-size="10pt" officeooo:rsid="00418c9a" style:font-size-asian="10pt" style:font-size-complex="10pt"/>
    </style:style>
    <style:style style:name="T23" style:family="text">
      <style:text-properties style:font-name="Verdana2" fo:font-size="10pt" officeooo:rsid="00603a9a" style:font-size-asian="10pt" style:font-size-complex="10pt"/>
    </style:style>
    <style:style style:name="T24" style:family="text">
      <style:text-properties style:font-name="Verdana2" fo:font-size="10pt" officeooo:rsid="0060a555" style:font-size-asian="10pt" style:font-size-complex="10pt"/>
    </style:style>
    <style:style style:name="T25" style:family="text">
      <style:text-properties style:font-name="Verdana2" fo:font-size="10pt" officeooo:rsid="0061e81e" style:font-size-asian="10pt" style:font-size-complex="10pt"/>
    </style:style>
    <style:style style:name="T26" style:family="text">
      <style:text-properties style:font-name="Verdana2" fo:font-size="10pt" officeooo:rsid="006a8f21" style:font-size-asian="10pt" style:font-size-complex="10pt"/>
    </style:style>
    <style:style style:name="T27" style:family="text">
      <style:text-properties style:font-name="Verdana2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Verdana2" fo:font-size="10pt" fo:font-weight="bold" officeooo:rsid="006a8f21" style:font-size-asian="10pt" style:font-weight-asian="bold" style:font-size-complex="10pt" style:font-weight-complex="bold"/>
    </style:style>
    <style:style style:name="T29" style:family="text">
      <style:text-properties style:font-name="Verdana2" fo:font-size="10pt" fo:font-style="italic" style:font-size-asian="10pt" style:font-style-asian="italic" style:font-size-complex="10pt" style:font-style-complex="italic"/>
    </style:style>
    <style:style style:name="T30" style:family="text">
      <style:text-properties fo:color="#c9211e" loext:opacity="100%" style:font-name="Verdana1" style:font-name-complex="Verdana3"/>
    </style:style>
    <style:style style:name="T31" style:family="text">
      <style:text-properties fo:color="#c9211e" loext:opacity="100%" style:font-name="Verdana1" officeooo:rsid="0010890b" style:font-name-complex="Verdana3"/>
    </style:style>
    <style:style style:name="T32" style:family="text">
      <style:text-properties style:text-line-through-style="none" style:text-line-through-type="none" officeooo:rsid="001a8352"/>
    </style:style>
    <style:style style:name="T33" style:family="text">
      <style:text-properties style:text-line-through-style="none" style:text-line-through-type="none" officeooo:rsid="003ed11a" fo:background-color="#ffff00" loext:char-shading-value="0"/>
    </style:style>
    <style:style style:name="T34" style:family="text">
      <style:text-properties fo:color="#ff0000" loext:opacity="100%"/>
    </style:style>
    <style:style style:name="T35" style:family="text">
      <style:text-properties fo:color="#ff0000" loext:opacity="100%" fo:font-weight="bold" style:font-weight-asian="bold" style:font-weight-complex="bold"/>
    </style:style>
    <style:style style:name="T36" style:family="text">
      <style:text-properties fo:color="#ff0000" loext:opacity="100%" officeooo:rsid="004018c8"/>
    </style:style>
    <style:style style:name="T37" style:family="text">
      <style:text-properties fo:color="#ff0000" loext:opacity="100%" officeooo:rsid="0047bddb"/>
    </style:style>
    <style:style style:name="T38" style:family="text">
      <style:text-properties fo:color="#ff0000" loext:opacity="100%" officeooo:rsid="0055ec93"/>
    </style:style>
    <style:style style:name="T39" style:family="text">
      <style:text-properties fo:color="#ff0000" loext:opacity="100%" officeooo:rsid="0035a354"/>
    </style:style>
    <style:style style:name="T40" style:family="text">
      <style:text-properties fo:color="#ff0000" loext:opacity="100%" style:text-underline-style="solid" style:text-underline-width="auto" style:text-underline-color="font-color"/>
    </style:style>
    <style:style style:name="T41" style:family="text">
      <style:text-properties officeooo:rsid="004710a0"/>
    </style:style>
    <style:style style:name="T42" style:family="text">
      <style:text-properties officeooo:rsid="0058f5e9"/>
    </style:style>
    <style:style style:name="T43" style:family="text">
      <style:text-properties style:text-underline-style="solid" style:text-underline-width="auto" style:text-underline-color="font-color" officeooo:rsid="0032e1e6"/>
    </style:style>
    <style:style style:name="T44" style:family="text">
      <style:text-properties officeooo:rsid="0032e1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tividade_0<text:span text:style-name="T42">7</text:span> – <text:span text:style-name="T42">Interrupções externas</text:span></text:p>
      <text:p text:style-name="P2"/>
      <text:p text:style-name="P16">Título: <text:span text:style-name="T42">Utilizando interrupções externas para medir frequência de eventos</text:span></text:p>
      <text:p text:style-name="P1"/>
      <text:p text:style-name="P1"><text:span text:style-name="T1">Objetivos: </text:span><text:span text:style-name="T2">O objetivo é </text:span><text:span text:style-name="T3">construir um tacômetro, aparelho capaz de medir a </text:span><text:span text:style-name="T4">velocidade de rotação de objetos. Normalmente tal aparelho utiliza a leitura do reflexo de um feixe laser para calcular a rotação do eixo sob medida.</text:span></text:p>
      <text:p text:style-name="P18"/>
      <text:p text:style-name="P1"><text:span text:style-name="T4"><draw:frame draw:style-name="fr4" draw:name="Figura2" text:anchor-type="as-char" svg:width="7.594cm" svg:height="7.362cm" draw:z-index="1"><draw:image xlink:href="Pictures/100000010000028E0000027A68326452.png" xlink:type="simple" xlink:show="embed" xlink:actuate="onLoad" draw:mime-type="image/png"/></draw:frame></text:span><text:span text:style-name="T4"><text:s text:c="4"/></text:span><text:span text:style-name="T4"><draw:frame draw:style-name="fr3" draw:name="Figura1" text:anchor-type="as-char" svg:y="-7.257cm" svg:width="7.897cm" svg:height="7.257cm" draw:z-index="0"><draw:image xlink:href="Pictures/10000001000002C0000002872E4AC200.png" xlink:type="simple" xlink:show="embed" xlink:actuate="onLoad" draw:mime-type="image/png"/></draw:frame></text:span></text:p>
      <text:p text:style-name="P1"/>
      <text:p text:style-name="P1">Nesta prática <text:span text:style-name="T5">utilizaremos o </text:span><text:span text:style-name="T33">Tinkercad</text:span><text:span text:style-name="T32"> </text:span><text:span text:style-name="T5">para simular um circuito simples usando o microcontrolador Atmega328, utilizado nas placas Arduino UNO.</text:span></text:p>
      <text:p text:style-name="P1"/>
      <text:p text:style-name="P16"><text:span text:style-name="T13">1. </text:span>Procedimentos:</text:p>
      <text:p text:style-name="P1"/>
      <text:p text:style-name="P23"><text:span text:style-name="T16">1</text:span><text:span text:style-name="T15">. </text:span><text:span text:style-name="T17">Copie o projeto fornecido </text:span><text:span text:style-name="T19">e</text:span><text:span text:style-name="T25">m </text:span><text:a xlink:type="simple" xlink:href="https://www.tinkercad.com/things/fk6qkVQ5vZn-external-interrupt-cf-202502-pratica-7-modelo?sharecode=K5rQehITIQ3RegJLLHQaew7nU-oUcbeXA8JEtBpNEVI" text:style-name="Internet_20_link" text:visited-style-name="Visited_20_Internet_20_Link"><text:span text:style-name="T26">https://www.tinkerchttps://www.tinkercad.com/things/fk6qkVQ5vZn-external-interrupt-cf-202502-pratica-7-modelo?sharecode=K5rQehITIQ3RegJLLHQaew7nU-oUcbeXA8JEtBpNEVI</text:span></text:a></text:p>
      <text:p text:style-name="P5"><draw:frame draw:style-name="fr1" draw:name="Figura3" text:anchor-type="as-char" svg:width="17cm" svg:height="10.756cm" draw:z-index="2"><draw:image xlink:href="Pictures/100000010000047F000002E27E039DDC.png" xlink:type="simple" xlink:show="embed" xlink:actuate="onLoad" draw:mime-type="image/png"/></draw:frame></text:p>
      <text:p text:style-name="P6"><text:soft-page-break/></text:p>
      <text:p text:style-name="P7"/>
      <text:p text:style-name="P28"><text:span text:style-name="T27">Utilize o pino </text:span><text:span text:style-name="T28">PC3</text:span><text:span text:style-name="T27"> para fazer a leitura do sinal de entrada </text:span><text:span text:style-name="T28">usando interrupção</text:span><text:span text:style-name="T15">. No simulador utilizamos um gerador de sinal para gerar o dado exatamente como precisamos.</text:span></text:p>
      <text:p text:style-name="P11"/>
      <text:p text:style-name="P28"><text:span text:style-name="T15">No circuito físico, utilizamos uma placa com um transmissor e receptor infravermelho que chaveia mediante o reflexo infravermelho recebido. A placa é a </text:span><text:span text:style-name="T20">HW-511, conhecida como “sensor segue linha”. Nela temos o conjunto transmissor-receptor TCRT5000 e um comparador analógico LM393 para fazer a histeria do sinal.</text:span></text:p>
      <text:p text:style-name="P27"><text:span text:style-name="T20"><draw:frame draw:style-name="fr2" draw:name="Figura4" text:anchor-type="as-char" svg:width="7.595cm" svg:height="4.759cm" draw:z-index="3"><draw:image xlink:href="Pictures/1000000100000316000001EFB3BD2B8F.png" xlink:type="simple" xlink:show="embed" xlink:actuate="onLoad" draw:mime-type="image/png"/></draw:frame></text:span><text:span text:style-name="T20"><text:s text:c="2"/></text:span><text:span text:style-name="T22"><draw:frame draw:style-name="fr1" draw:name="Figura6" text:anchor-type="as-char" svg:width="8.797cm" svg:height="4.233cm" draw:z-index="4"><draw:image xlink:href="Pictures/100000010000032000000181EBFF29F6.png" xlink:type="simple" xlink:show="embed" xlink:actuate="onLoad" draw:mime-type="image/png"/></draw:frame></text:span></text:p>
      <text:p text:style-name="P12"/>
      <text:p text:style-name="P29"><text:span text:style-name="T18">2</text:span><text:span text:style-name="T15">. </text:span><text:span text:style-name="T18">Você deve exibir </text:span><text:span text:style-name="T21">no LCD o número de revoluções por </text:span><text:span text:style-name="T23">segundo (frequência em Hz)</text:span><text:span text:style-name="T21">. Para isto, utilize a contagem das interrupções que ocorrem num determinado intervalo de tempo ou meça o intervalo entre duas interrupções.</text:span></text:p>
      <text:p text:style-name="P13"/>
      <text:p text:style-name="P30"><text:span text:style-name="T15">Vamos considerar o caso </text:span><text:span text:style-name="T24">base </text:span><text:span text:style-name="T15">de uma única hélice, caso em que um pulso representa uma única revolução. </text:span><text:span text:style-name="T24">C</text:span><text:span text:style-name="T15">omo a atualização do display ocorre a cada 100ms, podemos contar quantos pulsos ocorreram neste intervalo e multiplicar por 10 para obter </text:span><text:span text:style-name="T23">as revoluções por segundo. No entanto, se a frequência for muito baixa, a precisão e acurácia da medida fica muito prejudicada.</text:span></text:p>
      <text:p text:style-name="P10"/>
      <text:p text:style-name="P9">Por isso, quando o intervalo entre duas interrupções for maior que 10ms, utilize este intervalo para estimar a frequência. Exiba o resultado com uma resolução de 1 casa decimal.</text:p>
      <text:p text:style-name="P9"/>
      <text:p text:style-name="P9">Utilize o botão fornecido para permitir a configuração do número de hélices. A cada clique o número é incrementado até atingir 9 e voltar a 1. Quando o número de hélices é maior que 1, basta dividir o valor obtido anteriormente para estimar a frequência de rotação do eixo.</text:p>
      <text:p text:style-name="P8"/>
      <text:p text:style-name="P9">Na linha superior do LCD exiba a frequência seguido da unidade “Hz”. Na linha inferior exiba o número de hélices (Palavra Hélices: seguida pelo número que pode ir de 1 a 9).</text:p>
      <text:p text:style-name="P9"/>
      <text:p text:style-name="P31"><text:span text:style-name="T15">A taxa de atualização do LCD deve ser de </text:span><text:span text:style-name="T27">10Hz</text:span><text:span text:style-name="T15">, ou seja, você deve atualizar o display LCD somente </text:span><text:span text:style-name="T27">a cada 100ms</text:span><text:span text:style-name="T15">.</text:span></text:p>
      <text:p text:style-name="P31"><text:span text:style-name="T15"/></text:p>
      <text:p text:style-name="P32"><text:span text:style-name="T15">DICA: Utilize </text:span><text:span text:style-name="T29">dtostrl()</text:span><text:span text:style-name="T15"> para converter suas variáveis float para string.</text:span></text:p>
      <text:p text:style-name="P3"/>
      <text:p text:style-name="P14"><text:span text:style-name="T35">RESTRIÇÃO DE PROJETO:</text:span><text:span text:style-name="T34"> </text:span><text:span text:style-name="T36">O circuito utilizado no projeto deve ser o fornecido, podendo as mudanças ocorrerem somente em relação ao software. </text:span><text:span text:style-name="T37">Não devem haver delays (espera ociosa), exceto para o caso da simulação rodar mais rapidamente </text:span><text:span text:style-name="T38">(ou rotinas do display que já possuem tais delays)</text:span><text:span text:style-name="T37">. </text:span><text:span text:style-name="T39">Não utilizar bibliotecas externas, como o LiquidCristal. Deve-se utilizar o código passado em aula. </text:span><text:span text:style-name="T40">Este item é obrigatório</text:span><text:span text:style-name="T34"> e zera a avaliação caso não seja atendido.</text:span></text:p>
      <text:p text:style-name="P34"/>
      <text:p text:style-name="P35"><text:span text:style-name="T1">Atenção:</text:span> Ao utilizar main() ao invés de setup() e loop(), lembre-se de chamar a função init() para a inicialização do timer e correto funcionamento do millis().</text:p>
      <text:p text:style-name="P35"/>
      <text:p text:style-name="P36"><text:span text:style-name="T1">Atenção:</text:span> Não utilizar digitalRead(). <text:span text:style-name="T43">Este item é obrigatório</text:span><text:span text:style-name="T44"> e zera a avaliação caso não seja atendido.</text:span></text:p>
      <text:p text:style-name="P33"><text:span text:style-name="T37"/></text:p>
      <text:p text:style-name="P4"/>
      <text:p text:style-name="P24"><text:soft-page-break/><text:span text:style-name="T10">4</text:span><text:span text:style-name="T6">. </text:span><text:span text:style-name="T7">Cole</text:span><text:span text:style-name="T6"> o código fonte do microcontrolador </text:span><text:span text:style-name="T7">ao final deste arquivo.</text:span></text:p>
      <text:p text:style-name="P22"/>
      <text:p text:style-name="P25"><text:span text:style-name="T31">O</text:span><text:span text:style-name="T30">BRIGATÓRIO PARA AVALIAÇÃO:</text:span><text:span text:style-name="T6"> torne seu projeto compartilhado por link (não público) e cole o link para ele aqui:</text:span></text:p>
      <text:p text:style-name="P1"/>
      <text:p text:style-name="P16">ATENÇÃO: Documente seu código. Cada linha/bloco deve deixar explícito o seu papel.</text:p>
      <text:p text:style-name="P19"/>
      <text:p text:style-name="P19">______________________________________________________________</text:p>
      <text:p text:style-name="P15">RÚBRICA:</text:p>
      <text:p text:style-name="P15">Lógica da programação <text:span text:style-name="T14">e funcionamento (desde que atendendo às restrições de projeto)</text:span>: <text:span text:style-name="T41">100</text:span>%</text:p>
      <text:p text:style-name="P15"/>
      <text:p text:style-name="P15"><text:span text:style-name="T7">Valor desta atividade na média: </text:span><text:span text:style-name="T9">0</text:span><text:span text:style-name="T8">.</text:span><text:span text:style-name="T12">8</text:span></text:p>
      <text:p text:style-name="P20"/>
      <text:p text:style-name="P21">6. Notas extras:</text:p>
      <text:p text:style-name="P17"><text:span text:style-name="T11">6.1 </text:span><text:span text:style-name="T6">Adicionar um segundo botão que alterna entre Hz e RPM, ou seja, revoluções por segundo e revoluções por minuto </text:span><text:span text:style-name="T11">(trocar no LCD os dizeres ‘Hz’ por ‘RPM’ além de fazer os cálculos)</text:span><text:span text:style-name="T6">: </text:span><text:span text:style-name="T11">0.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8T13:17:22.692000000</meta:creation-date>
    <meta:editing-duration>PT2M29S</meta:editing-duration>
    <meta:editing-cycles>2</meta:editing-cycles>
    <meta:generator>LibreOffice/24.2.0.3$Windows_X86_64 LibreOffice_project/da48488a73ddd66ea24cf16bbc4f7b9c08e9bea1</meta:generator>
    <dc:date>2026-05-18T13:17:25.115000000</dc:date>
    <meta:document-statistic meta:table-count="0" meta:image-count="5" meta:object-count="0" meta:page-count="3" meta:paragraph-count="30" meta:word-count="602" meta:character-count="3939" meta:non-whitespace-character-count="3357"/>
  </office:meta>
</office:document-meta>
</file>